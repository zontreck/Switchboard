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10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3"/>
          <table:table-cell table:style-name="ce8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number-columns-repeated="3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objec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14:22:46.244591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5-16T14:22:55.384827443</dc:date>
    <meta:editing-duration>P7DT15H52M4S</meta:editing-duration>
    <meta:editing-cycles>44</meta:editing-cycles>
    <meta:generator>LibreOffice/26.2.3.2$Linux_X86_64 LibreOffice_project/620$Build-2</meta:generator>
    <meta:document-statistic meta:table-count="1" meta:cell-count="68" meta:object-count="0"/>
  </office:meta>
</office:document-meta>
</file>