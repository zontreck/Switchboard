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3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/>
          <table:table-cell table:style-name="ce8" table:number-columns-repeated="3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31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8"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/>
          <table:table-cell table:style-name="ce8"/>
          <table:table-cell table:style-name="ce5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2:13:01.76101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9T11:19:36.617677956</dc:date>
    <meta:editing-duration>P5DT15H3M38S</meta:editing-duration>
    <meta:editing-cycles>30</meta:editing-cycles>
    <meta:generator>LibreOffice/26.2.2.2$Linux_X86_64 LibreOffice_project/620$Build-2</meta:generator>
    <meta:document-statistic meta:table-count="1" meta:cell-count="62" meta:object-count="0"/>
  </office:meta>
</office:document-meta>
</file>